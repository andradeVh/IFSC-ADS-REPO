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061C8AFE7B8.png" manifest:media-type="image/png"/>
  <manifest:file-entry manifest:full-path="Pictures/100000010000005F00000085527946CA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5" style:family="paragraph" style:parent-style-name="Standard">
      <style:text-properties style:font-name="Consolas" style:font-name-asian="Consolas1" style:font-name-complex="Consolas1"/>
    </style:style>
    <style:style style:name="P6" style:family="paragraph" style:parent-style-name="Standard">
      <style:paragraph-properties fo:text-align="end" style:justify-single-word="false"/>
      <style:text-properties style:font-name="Consolas" style:font-name-asian="Consolas1" style:font-name-complex="Consolas1"/>
    </style:style>
    <style:style style:name="P7" style:family="paragraph">
      <loext:graphic-properties draw:fill="solid" draw:fill-color="#a0a0a0"/>
      <style:paragraph-properties fo:text-align="center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line-height="100%" fo:orphans="0" fo:widows="0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line-height="100%" fo:orphans="0" fo:widows="0"/>
      <style:text-properties style:font-name="Times New Roman" fo:font-weight="bold" officeooo:rsid="0019198c" officeooo:paragraph-rsid="0019198c" style:font-name-asian="Times New Roman1" style:font-weight-asian="bold" style:font-name-complex="Times New Roman1"/>
    </style:style>
    <style:style style:name="P17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text-align="center" style:justify-single-word="false"/>
      <style:text-properties fo:color="#00ff00" loext:opacity="100%" style:font-name="Times New Roman" fo:font-weight="bold" fo:background-color="#000000" style:font-name-asian="Times New Roman1" style:font-weight-asian="bold" style:font-name-complex="Times New Roman1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Source Sans Pro Black'" style:font-style-name="Black" style:font-family-generic="swiss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Source Sans Pro Black'" style:font-style-name="Black" style:font-family-generic="swiss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4" style:family="text">
      <style:text-properties style:font-name="Times New Roman" officeooo:rsid="0019414a" style:font-name-asian="Times New Roman1" style:font-name-complex="Times New Roman1"/>
    </style:style>
    <style:style style:name="T5" style:family="text">
      <style:text-properties officeooo:rsid="0019198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Source Sans Pro Black'" style:font-style-name="Black" style:font-family-generic="swiss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-0.11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40469*" fo:start-indent="0cm" fo:end-indent="0.273cm"/>
          <style:column style:rel-width="25066*" fo:start-indent="0.273cm" fo:end-indent="0cm"/>
        </style:columns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4.145cm" fo:min-width="8.334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stroke-dash="Fine_20_Dashed" svg:stroke-width="0.101cm" svg:stroke-color="#800080" draw:marker-start="" draw:marker-start-width="0.409cm" draw:marker-start-center="false" draw:marker-end="" draw:marker-end-width="0.409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4.096cm" fo:min-width="8.287cm" fo:padding-top="0.168cm" fo:padding-bottom="0.168cm" fo:padding-left="0.288cm" fo:padding-right="0.288cm" fo:wrap-option="wrap" draw:shadow="visible" draw:shadow-offset-x="0cm" draw:shadow-offset-y="0cm" draw:shadow-color="#808080" style:writing-mode="lr-tb" loext:decorative="false" style:run-through="foreground" style:wrap="run-through" style:number-wrapped-paragraphs="no-limit" style:vertical-pos="middle" style:vertical-rel="baseline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4.17cm" fo:min-width="8.359cm" fo:padding-top="0.131cm" fo:padding-bottom="0.131cm" fo:padding-left="0.25cm" fo:padding-right="0.25cm" fo:wrap-option="wrap" draw:shadow="visible" draw:shadow-offset-x="0.3cm" draw:shadow-offset-y="0.3cm" draw:shadow-color="#ff4000" draw:shadow-opacity="100%" style:writing-mode="lr-tb" loext:decorative="false" style:run-through="foreground" style:wrap="run-through" style:number-wrapped-paragraphs="no-limit" style:vertical-pos="middle" style:vertical-rel="baseline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1">Introdução à Computação </text:span><draw:frame draw:style-name="fr1" draw:name="image1.gif" text:anchor-type="char" svg:x="0.053cm" svg:y="0.318cm" svg:width="2.873cm" svg:height="3.531cm" draw:z-index="3"><draw:image xlink:href="Pictures/100000010000005F00000085527946CA.gif" xlink:type="simple" xlink:show="embed" xlink:actuate="onLoad" draw:mime-type="image/gif"/></draw:frame></text:p>
        <text:p text:style-name="P2"/>
      </text:section>
      <text:section text:style-name="Sect2" text:name="Section1">
        <text:p text:style-name="P3"/>
        <text:p text:style-name="P4">Prova 2: Usuários e Permissionamento, Processos, Compactação e Shell Script</text:p>
      </text:section>
      <text:section text:style-name="Sect3" text:name="Section2">
        <text:p text:style-name="P3"/>
        <text:p text:style-name="P3">Professor: Diego da Silva de Medeiros</text:p>
        <text:p text:style-name="P5"/>
        <text:p text:style-name="P6">diegomedeiros@ifsc.edu.br</text:p>
      </text:section>
      <text:section text:style-name="Sect2" text:name="Section3">
        <text:p text:style-name="Standard"><draw:rect text:anchor-type="as-char" style:rel-width="100%" draw:z-index="5" draw:name="Forma1" draw:style-name="gr1" draw:text-style-name="P7" svg:width="0.003cm" svg:height="0.054cm"><text:p/></draw:rect></text:p>
        <text:p text:style-name="P3"/>
        <text:p text:style-name="P8">Esta prova consiste na execução das atividades a seguir, e entrega dos resultados através da escrita nos espaços delimitados para cada questão. Indique nas resoluções o maior número de detalhes possível, incluindo os comandos utilizados, a ideia, dificuldades encontradas, erros solucionados, etc. A prova deverá ser entregue no sistema acadêmico (SIGAA), em formato PDF. Não esqueça de incluir seu nome no arquivo, para evitar eventuais problemas.</text:p>
        <text:p text:style-name="P8"/>
        <text:p text:style-name="P9">NÃO SERÃO ACEITOS ARQUIVOS ENTREGUES EM OUTROS FORMATOS ALÉM DO PDF.</text:p>
        <text:p text:style-name="P10"/>
        <text:p text:style-name="Standard"><draw:rect text:anchor-type="as-char" style:rel-width="100%" draw:z-index="6" draw:name="Forma2" draw:style-name="gr1" draw:text-style-name="P7" svg:width="0.003cm" svg:height="0.054cm"><text:p/></draw:rect></text:p>
        <text:p text:style-name="P3"/>
        <text:p text:style-name="P3"/>
        <text:p text:style-name="Standard"><text:span text:style-name="T1">Questão 1 (2 pontos):</text:span><text:span text:style-name="T2"> Faça o download do arquivo disponível em [</text:span><text:a xlink:type="simple" xlink:href="https://drive.google.com/file/d/1UrKxCnGZZ3GO2Qm3IkRv1RT3qeJI64iO/view?usp=sharing" text:style-name="ListLabel_20_19" text:visited-style-name="ListLabel_20_19"><text:span text:style-name="T3">link</text:span></text:a><text:span text:style-name="T2">]. Perceba que o arquivo é um arquivo compactado usando o GZIP no empacotador TAR (extensão .tar.gz). Escreva no espaço abaixo o comando necessário para extrair os arquivos.</text:span></text:p>
        <text:p text:style-name="P10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1"/>
            </table:table-cell>
          </table:table-row>
        </table:table>
        <text:p text:style-name="P3"/>
        <text:p text:style-name="P3"/>
        <text:p text:style-name="Standard"><text:span text:style-name="T1">Questão 2 (2 pontos):</text:span><text:span text:style-name="T2"> Dado o esquema de permissão dos arquivos abaixo, escreva nos espaços devidos o comando que modifica o esquema de permissão conforme indicado.</text:span></text:p>
        <text:p text:style-name="P3"/>
        <text:p text:style-name="P12"><draw:frame draw:style-name="fr2" draw:name="image2.png" text:anchor-type="as-char" svg:width="12.7cm" svg:height="2.566cm" draw:z-index="4"><draw:image xlink:href="Pictures/10000000000001E000000061C8AFE7B8.png" xlink:type="simple" xlink:show="embed" xlink:actuate="onLoad" draw:mime-type="image/png"/></draw:frame></text:p>
        <text:p text:style-name="P3"/>
        <text:p text:style-name="Standard"><text:span text:style-name="T1">I.</text:span><text:span text:style-name="T2"> Retirar a permissão de escrita do dono para o arquivo1.txt</text:span></text:p>
        <text:p text:style-name="P1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4"/>
            </table:table-cell>
          </table:table-row>
        </table:table>
        <text:p text:style-name="P3"/>
        <text:p text:style-name="Standard"><text:span text:style-name="T1">II.</text:span><text:span text:style-name="T2"> Retirar a permissão de leitura e escrita do grupo para o arquivo2.txt</text:span></text:p>
        <text:p text:style-name="P10"/>
        <table:table table:name="Table3" table:style-name="Table3">
          <table:table-column table:style-name="Table3.A"/>
          <text:soft-page-break/>
          <table:table-row table:style-name="Table3.1">
            <table:table-cell table:style-name="Table3.A1" office:value-type="string">
              <text:p text:style-name="P11"/>
            </table:table-cell>
          </table:table-row>
        </table:table>
        <text:p text:style-name="P3"/>
        <text:p text:style-name="Standard"><text:span text:style-name="T1">III.</text:span><text:span text:style-name="T2"> Incluir a permissão de leitura, escrita e execução para outros usuários para o arquivo3.txt</text:span></text:p>
        <text:p text:style-name="P10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1"/>
            </table:table-cell>
          </table:table-row>
        </table:table>
        <text:p text:style-name="P3"/>
        <text:p text:style-name="Standard"><text:span text:style-name="T1">IV.</text:span><text:span text:style-name="T2"> Usando o modo de permissionamento octal, fazer todos (dono, grupo e outros) terem permissão de execução e leitura e não ter permissão de escrita no arquivo4.txt</text:span></text:p>
        <text:p text:style-name="P10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1"/>
            </table:table-cell>
          </table:table-row>
        </table:table>
        <text:p text:style-name="P3"/>
        <text:p text:style-name="Standard"><text:span text:style-name="T1">V.</text:span><text:span text:style-name="T2"> Usando o modo de permissionamento octal, deixar o esquema de permissionamento do arquivo5.txt da seguinte forma:</text:span></text:p>
        <text:p text:style-name="P3"/>
        <text:list text:style-name="WWNum1">
          <text:list-item>
            <text:p text:style-name="P15">Usuário: somente permissão de leitura</text:p>
          </text:list-item>
          <text:list-item>
            <text:p text:style-name="P15">Grupo: nenhuma permissão</text:p>
          </text:list-item>
          <text:list-item>
            <text:p text:style-name="P15">Outros: permissão de leitura e execução</text:p>
          </text:list-item>
        </text:list>
        <text:p text:style-name="P10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1"/>
            </table:table-cell>
          </table:table-row>
        </table:table>
        <text:p text:style-name="P3"/>
        <text:p text:style-name="P3"/>
        <text:p text:style-name="Standard"><text:span text:style-name="T1">Questão 3 (3 pontos):</text:span><text:span text:style-name="T2"> Execute o script disponível dentro do pacote tar.gz baixado na primeira questão. Caso um erro aconteça, use as ferramentas de gerenciamento de processos para encontrar uma forma de interromper </text:span><text:span text:style-name="T4">e encerrar</text:span><text:span text:style-name="T2"> a execução da script (o CTRL+C está proibido). Escreva o procedimento utilizado, incluindo os comandos executados, no espaço abaixo.</text:span></text:p>
        <text:p text:style-name="P10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6"/>
            </table:table-cell>
          </table:table-row>
        </table:table>
        <text:p text:style-name="P3"/>
        <text:p text:style-name="P3"/>
        <text:p text:style-name="Standard"><text:span text:style-name="T1">Questão 4 (3 pontos):</text:span><text:span text:style-name="T2"> Desenvolva um script que faça as seguintes tarefas:</text:span></text:p>
        <text:p text:style-name="P3"/>
        <text:list text:style-name="WWNum2">
          <text:list-item>
            <text:p text:style-name="P17">Mostrar uma mensagem na tela informando que a script começou a sua execução</text:p>
          </text:list-item>
          <text:list-item>
            <text:p text:style-name="P17">Mostrar na tela a data do início da execução</text:p>
          </text:list-item>
          <text:list-item>
            <text:p text:style-name="P17">Apagar todos os arquivos presentes no diretório atual</text:p>
          </text:list-item>
          <text:list-item>
            <text:p text:style-name="P17">Confirmar o apagamento dos arquivos listando detalhadamente o conteúdo do diretório atual</text:p>
          </text:list-item>
        </text:list>
        <text:p text:style-name="P3"/>
        <text:p text:style-name="P18"><text:span text:style-name="T1">I.</text:span><text:span text:style-name="T2"> Escreva o script desenvolvido no espaço abaixo:</text:span></text:p>
        <text:p text:style-name="P10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1"/>
            </table:table-cell>
          </table:table-row>
        </table:table>
        <text:p text:style-name="P10"/>
        <text:p text:style-name="P10"/>
        <text:p text:style-name="Standard"><text:span text:style-name="T1">II.</text:span><text:span text:style-name="T2"> Use o script desenvolvido para apagar os arquivos utilizados nesta avaliação. Inclua no espaço abaixo o procedimento utilizado para execução do script.</text:span></text:p>
        <text:p text:style-name="P10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1"/>
            </table:table-cell>
          </table:table-row>
        </table:table>
        <text:p text:style-name="P3"/>
        <text:p text:style-name="P3"/>
        <text:p text:style-name="P19"><text:span text:style-name="T5">EXPORTE</text:span> O ARQUIVO COMO PDF E SUBMETA VIA SISTEMA ACADÊMICO (SIGAA)</text:p>
        <text:p text:style-name="P19"/>
        <text:p text:style-name="P19"/>
        <text:p text:style-name="P19"><draw:custom-shape text:anchor-type="paragraph" draw:z-index="0" draw:name="Letter" draw:style-name="gr2" draw:text-style-name="P21" svg:width="8.859cm" svg:height="4.43cm" svg:x="4.452cm" svg:y="2.648cm"><text:p text:style-name="P20"><text:span text:style-name="T6">PDF</text:span></text:p>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22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draw:custom-shape text:anchor-type="as-char" draw:z-index="1" draw:name="Planet" draw:style-name="gr3" draw:text-style-name="P23" svg:width="8.861cm" svg:height="4.43cm"><text:p text:style-name="P22"><text:span text:style-name="T7">PDF</text:span></text:p>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<draw:equation draw:name="f0" draw:formula="$0 "/><draw:equation draw:name="f1" draw:formula="21600-$0 "/><draw:handle draw:handle-range-x-minimum="0" draw:handle-range-x-maximum="10800" draw:handle-position="$0 top" draw:handle-position-x="$0" draw:handle-position-y="top"/></draw:enhanced-geometry></draw:custom-shape><draw:custom-shape text:anchor-type="as-char" draw:z-index="2" draw:name="Retro" draw:style-name="gr4" draw:text-style-name="P25" svg:width="8.859cm" svg:height="4.43cm"><text:p text:style-name="P24"><text:span text:style-name="T8">Não esqueça!</text:span></text:p><text:p text:style-name="P24"><text:span text:style-name="T8"/></text:p><text:p text:style-name="P24"><text:span text:style-name="T8">PDF!!</text:span></text:p>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22%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range-y-minimum="0" draw:handle-range-y-maximum="15400" draw:handle-position="left $0" draw:handle-position-x="left" draw:handle-position-y="$0"/></draw:enhanced-geometry></draw:custom-shape></text:p>
        <text:p text:style-name="P19"/>
        <text:p text:style-name="P19"/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261" draw:display-name="Gradient 261" draw:style="linear" draw:start-color="#800080" draw:end-color="#ffbf00" draw:start-intensity="100%" draw:end-intensity="100%" draw:angle="0deg" draw:border="0%">
      <loext:gradient-stop svg:offset="0" loext:color-type="rgb" loext:color-value="#800080"/>
      <loext:gradient-stop svg:offset="1" loext:color-type="rgb" loext:color-value="#ffbf00"/>
    </draw:gradient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2-02T17:51:49.604319000</dc:date>
    <meta:editing-duration>PT5M14S</meta:editing-duration>
    <meta:editing-cycles>3</meta:editing-cycles>
    <meta:document-statistic meta:table-count="9" meta:image-count="2" meta:object-count="0" meta:page-count="3" meta:paragraph-count="29" meta:word-count="416" meta:character-count="2660" meta:non-whitespace-character-count="2275"/>
  </office:meta>
</office:document-meta>
</file>